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819in" table:align="left"/>
    </style:style>
    <style:style style:name="Table1.A" style:family="table-column">
      <style:table-column-properties style:column-width="1.3285in"/>
    </style:style>
    <style:style style:name="Table1.B" style:family="table-column">
      <style:table-column-properties style:column-width="3.353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  <style:text-properties officeooo:rsid="00119cc4" officeooo:paragraph-rsid="00132372"/>
    </style:style>
    <style:style style:name="P6" style:family="paragraph" style:parent-style-name="Text_20_body" style:list-style-name="L3">
      <style:paragraph-properties fo:margin-top="0in" fo:margin-bottom="0in" style:contextual-spacing="false"/>
      <style:text-properties officeooo:rsid="00132372" officeooo:paragraph-rsid="00132372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officeooo:rsid="0017071e" officeooo:paragraph-rsid="0017071e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officeooo:paragraph-rsid="00179498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rsid="0017ebcb" officeooo:paragraph-rsid="0017ebcb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rsid="0017ebcb" officeooo:paragraph-rsid="001a8dee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officeooo:paragraph-rsid="001a8dee"/>
    </style:style>
    <style:style style:name="T1" style:family="text">
      <style:text-properties officeooo:rsid="00116b7c"/>
    </style:style>
    <style:style style:name="T2" style:family="text">
      <style:text-properties officeooo:rsid="00109f36"/>
    </style:style>
    <style:style style:name="T3" style:family="text">
      <style:text-properties officeooo:rsid="00132372"/>
    </style:style>
    <style:style style:name="T4" style:family="text">
      <style:text-properties officeooo:rsid="0013bc4b"/>
    </style:style>
    <style:style style:name="T5" style:family="text">
      <style:text-properties officeooo:rsid="001a8dee"/>
    </style:style>
    <style:style style:name="T6" style:family="text">
      <style:text-properties officeooo:rsid="00179498"/>
    </style:style>
    <style:style style:name="T7" style:family="text">
      <style:text-properties fo:color="#70b8ff" loext:opacity="100%"/>
    </style:style>
    <style:style style:name="T8" style:family="text">
      <style:text-properties officeooo:rsid="00196881"/>
    </style:style>
    <style:style style:name="T9" style:family="text">
      <style:text-properties fo:color="#d3d7de" loext:opacity="100%"/>
    </style:style>
    <style:style style:name="T10" style:family="text">
      <style:text-properties officeooo:rsid="0017ebcb"/>
    </style:style>
    <style:style style:name="T11" style:family="text">
      <style:text-properties officeooo:rsid="001c3b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 Lab: Network Monitoring with LibreNMS</text:h>
      <text:h text:style-name="Heading_20_2" text:outline-level="2">Overview</text:h>
      <text:p text:style-name="Text_20_body">Designed and deployed a network monitoring stack in a self-hosted virtual lab, built from the ground up on Ubuntu Server 22.04 LTS. The project simulates a small enterprise monitoring environment: a LibreNMS instance polling network devices via SNMP, backed by MariaDB, PHP-FPM, and Nginx.</text:p>
      <text:p text:style-name="Text_20_body">Built as part of a structured transition into cybersecurity, alongside CompTIA Security+ (SY0-701) study and Hack The Box <text:span text:style-name="T1">Modules. </text:span></text:p>
      <text:h text:style-name="Heading_20_2" text:outline-level="2">Why I Built This</text:h>
      <text:p text:style-name="Text_20_body">Monitoring and visibility are foundational to security operations — you can't defend, <text:span text:style-name="T2">receive alerts</text:span>, or investigate what you can't see. I wanted hands-on experience with the full stack behind a monitoring platform (not just clicking through a GUI), including the Linux service dependencies, database layer, and networking configuration that make it work — and break.</text:p>
      <text:h text:style-name="Heading_20_2" text:outline-level="2">Environment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1.A1" office:value-type="string">
            <text:p text:style-name="Table_20_Contents">Host</text:p>
          </table:table-cell>
          <table:table-cell table:style-name="Table1.A1" office:value-type="string">
            <text:p text:style-name="Table_20_Contents">ThinkPad T490</text:p>
          </table:table-cell>
        </table:table-row>
        <table:table-row>
          <table:table-cell table:style-name="Table1.A1" office:value-type="string">
            <text:p text:style-name="Table_20_Contents">Hypervisor</text:p>
          </table:table-cell>
          <table:table-cell table:style-name="Table1.A1" office:value-type="string">
            <text:p text:style-name="Table_20_Contents">VirtualBox</text:p>
          </table:table-cell>
        </table:table-row>
        <table:table-row>
          <table:table-cell table:style-name="Table1.A1" office:value-type="string">
            <text:p text:style-name="Table_20_Contents">Monitoring server</text:p>
          </table:table-cell>
          <table:table-cell table:style-name="Table1.A1" office:value-type="string">
            <text:p text:style-name="Table_20_Contents">Ubuntu Server 22.04 LTS</text:p>
          </table:table-cell>
        </table:table-row>
        <table:table-row>
          <table:table-cell table:style-name="Table1.A1" office:value-type="string">
            <text:p text:style-name="Table_20_Contents">Stack</text:p>
          </table:table-cell>
          <table:table-cell table:style-name="Table1.A1" office:value-type="string">
            <text:p text:style-name="Table_20_Contents">LibreNMS, MariaDB, PHP-FPM, Nginx, SNMP</text:p>
          </table:table-cell>
        </table:table-row>
        <table:table-row>
          <table:table-cell table:style-name="Table1.A1" office:value-type="string">
            <text:p text:style-name="Table_20_Contents">Network</text:p>
          </table:table-cell>
          <table:table-cell table:style-name="Table1.A1" office:value-type="string">
            <text:p text:style-name="Table_20_Contents">Dual-adapter config (NAT + host-only/internal)</text:p>
          </table:table-cell>
        </table:table-row>
        <table:table-row>
          <table:table-cell table:style-name="Table1.A1" office:value-type="string">
            <text:p text:style-name="Table_20_Contents">Monitored devices</text:p>
          </table:table-cell>
          <table:table-cell table:style-name="Table1.A1" office:value-type="string">
            <text:p text:style-name="Table_20_Contents">2 network devices (SNMP-polled)</text:p>
          </table:table-cell>
        </table:table-row>
      </table:table>
      <text:p text:style-name="Text_20_body"><text:span text:style-name="Emphasis">Diagram placeholder — add a simple network topology image here (draw.io / Excalidraw / diagrams.net export works well).</text:span></text:p>
      <text:h text:style-name="Heading_20_2" text:outline-level="2">What It Does</text:h>
      <text:list text:style-name="L1">
        <text:list-item>
          <text:p text:style-name="P1">Polls monitored devices over SNMP for uptime, interface stats, and health metrics </text:p>
        </text:list-item>
        <text:list-item>
          <text:p text:style-name="P1">Stores time-series and device data in MariaDB </text:p>
        </text:list-item>
        <text:list-item>
          <text:p text:style-name="P1">Serves the LibreNMS web UI through Nginx + PHP-FPM </text:p>
        </text:list-item>
        <text:list-item>
          <text:p text:style-name="P2">Provides a single dashboard for device status across the lab network </text:p>
        </text:list-item>
      </text:list>
      <text:h text:style-name="Heading_20_2" text:outline-level="2"><text:soft-page-break/></text:h>
      <text:h text:style-name="Heading_20_2" text:outline-level="2">Build Process (High-Level)</text:h>
      <text:list text:style-name="L2">
        <text:list-item>
          <text:p text:style-name="P3">Provisioned Ubuntu Server 22.04 LTS as a VirtualBox VM with dual network adapters (one NAT for internet/updates, one internal/host-only for lab device communication) </text:p>
        </text:list-item>
        <text:list-item>
          <text:p text:style-name="P3">Installed and configured the LEMP-adjacent stack: Nginx, PHP-FPM, MariaDB </text:p>
        </text:list-item>
        <text:list-item>
          <text:p text:style-name="P3">Installed LibreNMS and configured its dependencies (cron jobs, <text:span text:style-name="Source_20_Text">lnms</text:span> validation, permissions) </text:p>
        </text:list-item>
        <text:list-item>
          <text:p text:style-name="P3">Configured SNMP on target devices and added them to LibreNMS for polling </text:p>
        </text:list-item>
        <text:list-item>
          <text:p text:style-name="P4">Validated data collection and dashboard rendering end-to-end </text:p>
        </text:list-item>
      </text:list>
      <text:h text:style-name="Heading_20_2" text:outline-level="2">Challenges &amp; Troubleshooting</text:h>
      <text:p text:style-name="Text_20_body">This is the part that mattered most — the actual learning happened in the failures:</text:p>
      <text:list text:style-name="L3">
        <text:list-item>
          <text:p text:style-name="P5">Initial install<text:span text:style-name="T3"> with PHP packages was with version 8.1 and received lines of errors.</text:span></text:p>
          <text:p text:style-name="P6">[Solution] Added a PPA (personal package archive) to find those specific packages and checked installed version of PHP (8.5), Updated package list <text:span text:style-name="T4">sting.</text:span></text:p>
        </text:list-item>
        <text:list-item>
          <text:p text:style-name="P7">During the environmental configuration, I received an error stating : Access denied for user (using password: NO) [Solution] Examined the .env file, found and removed <text:s/>#’s before every line.. essentially ignoring the credentials and not even passing them off. </text:p>
        </text:list-item>
        <text:list-item>
          <text:p text:style-name="P8"><text:span text:style-name="T5">[Permissions Related – Group] </text:span><text:span text:style-name="T6"><text:s/></text:span><text:span text:style-name="T5">The </text:span><text:span text:style-name="T6">environmental configuration showed the working directory was the home path instead of LibreNMS. [Solution] Added myself to the user group: </text:span><text:span text:style-name="T7">sudo</text:span> <text:span text:style-name="T7">usermod</text:span> -a -G librenms <text:span text:style-name="T6">USERNAME. Logged out for the changes to take effect. </text:span></text:p>
          <text:p text:style-name="P9">Problem persisted, ran: cd /opt/librenms &amp;&amp; sudo -u librenms php /opt/librenms/artisan migrate –force to change the directory and run the command at the same time. Adding –force skips the non-interactive safety prompts.. something that probably should be avoided on a production floor.</text:p>
          <text:p text:style-name="P10">[ <text:span text:style-name="T8">Permissions Related- wrong path directory</text:span>] <text:span text:style-name="T9">*</text:span>Related symptom: also surfaced as a `MissingAppKeyException` elsewhere in the stack — same root cause (wrong path/user context), different error message. Good reminder that one misconfiguration can cascade into multiple, seemingly unrelated-looking errors depending on which part of the app hits it first.<text:span text:style-name="T9">*</text:span></text:p>
        </text:list-item>
        <text:list-item>
          <text:p text:style-name="P11"><text:span text:style-name="T10"><text:s/></text:span><text:span text:style-name="T5">[403-Forbidden Error] Nginx was unable to load recourse. A permissions issue that was initially solved with granting access to all files. During write-up I later scaled down permissions for files with no need for execute permissions. Verified 922 files had unnecessarily broad execute permissions after the b</text:span><text:span text:style-name="T11">road</text:span><text:span text:style-name="T5"> 755 fix, narrowed to 644 and upon recount, confirmed that number was zero, </text:span><text:span text:style-name="T11">and narrowing the attack surface in the process. Confirmed http portal is still working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7T08:00:55.650089000</meta:creation-date>
    <dc:date>2026-07-08T12:55:26.140600900</dc:date>
    <meta:editing-duration>PT4H28M21S</meta:editing-duration>
    <meta:editing-cycles>2</meta:editing-cycles>
    <meta:generator>LibreOffice/26.2.4.2$Windows_X86_64 LibreOffice_project/0229ac93fcf0d7cbc6376066c6f35021cef002dc</meta:generator>
    <meta:document-statistic meta:table-count="1" meta:image-count="0" meta:object-count="0" meta:page-count="2" meta:paragraph-count="42" meta:word-count="594" meta:character-count="3973" meta:non-whitespace-character-count="3415"/>
  </office:meta>
</office:document-meta>
</file>